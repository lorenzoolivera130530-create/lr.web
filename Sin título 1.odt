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0215" officeooo:paragraph-rsid="00090215"/>
    </style:style>
    <style:style style:name="P2" style:family="paragraph" style:parent-style-name="Standard">
      <style:paragraph-properties fo:text-align="left" style:justify-single-word="false"/>
      <style:text-properties officeooo:rsid="00090215" officeooo:paragraph-rsid="00090215"/>
    </style:style>
    <style:style style:name="P3" style:family="paragraph" style:parent-style-name="Heading_20_3">
      <style:paragraph-properties fo:text-align="left" style:justify-single-word="false"/>
      <style:text-properties officeooo:rsid="00090215" officeooo:paragraph-rsid="00090215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090215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090215"/>
    </style:style>
    <style:style style:name="P6" style:family="paragraph" style:parent-style-name="Text_20_body" style:list-style-name="L1">
      <style:text-properties officeooo:rsid="00090215"/>
    </style:style>
    <style:style style:name="P7" style:family="paragraph" style:parent-style-name="Heading_20_3">
      <style:text-properties officeooo:rsid="00090215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090215"/>
    </style:style>
    <style:style style:name="P9" style:family="paragraph" style:parent-style-name="Text_20_body" style:list-style-name="L2">
      <style:text-properties officeooo:rsid="00090215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090215" officeooo:paragraph-rsid="00090215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090215" officeooo:paragraph-rsid="000b1819"/>
    </style:style>
    <style:style style:name="T1" style:family="text">
      <style:text-properties officeooo:rsid="000999a2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- remota</text:p>
      <text:p text:style-name="P2"/>
      <text:p text:style-name="P2"/>
      <text:h text:style-name="P3" text:outline-level="3">1. Exploración sensorial</text:h>
      <text:p text:style-name="P4">En el primer párrafo no hay muchas descripciones directas, pero estas palabras y frases me ayudaron a imaginar:</text:p>
      <text:list text:style-name="L1">
        <text:list-item>
          <text:p text:style-name="P5"><text:span text:style-name="Strong_20_Emphasis">El lugar</text:span>: “bucólico paraje yanqui” y “descuidado contratiempo con una tumba”. Me imagino un pueblo tranquilo del campo, con casas simples y un cementerio viejo. Suena normal… pero ya aparece la tumba, y eso lo vuelve raro. </text:p>
        </text:list-item>
        <text:list-item>
          <text:p text:style-name="P5"><text:span text:style-name="Strong_20_Emphasis">Sonidos</text:span>: Casi no hay. Solo el tono del narrador, como si un viejo te estuviera contando algo serio: “Mencione usted...”. </text:p>
        </text:list-item>
        <text:list-item>
          <text:p text:style-name="P5"><text:span text:style-name="Strong_20_Emphasis">Sensaciones físicas</text:span>: La palabra “impregnar” <text:span text:style-name="T1">m</text:span>e da una sensación de algo que se <text:span text:style-name="T1">pega</text:span> lento y pesado. </text:p>
        </text:list-item>
        <text:list-item>
          <text:p text:style-name="P6"><text:span text:style-name="Strong_20_Emphasis">Emociones del personaje</text:span>: “Nada más absurdo, a mi juicio” y “Dios sabe, empero...”. El narrador parece cansado, irónico y superior, como diciendo “ustedes no <text:span text:style-name="T1">saben</text:span> lo que <text:span text:style-name="T1">yo se</text:span>”. </text:p>
        </text:list-item>
      </text:list>
      <text:p text:style-name="P4"><text:span text:style-name="Strong_20_Emphasis">Qué efecto me produce</text:span>: Me pone alerta. Siento que algo malo va a pasar y que el narrador ya sabe lo que pasa en la historia.</text:p>
      <text:h text:style-name="P7" text:outline-level="3">2. Construcción del clima</text:h>
      <text:list text:style-name="L2">
        <text:list-item>
          <text:p text:style-name="P8">Crea un ambiente de <text:span text:style-name="Strong_20_Emphasis"><text:span text:style-name="T2">falsa tranquilidad</text:span></text:span>. Empieza hablando de un pueblo normal y una historia que parece cómica, pero enseguida te avisa que no lo es. </text:p>
          <text:p text:style-name="P8">Transmite ironía, advertencia y un toque de oscuridad. Como si te dijera: “Esto no va a ser divertido”. </text:p>
        </text:list-item>
        <text:list-item>
          <text:p text:style-name="P9"><text:s/>Porque juega con nuestras expectativas. Crees que va a ser una historia graciosa o tonta sobre un enterrador torpe, pero el narrador te dice que es mucho peor: tan horrible que hasta las historias más negras parecerían “luminosas” al lado de esta. Eso te deja intranquilo desde el principio. </text:p>
        </text:list-item>
      </text:list>
      <text:h text:style-name="P7" text:outline-level="3">3. El miedo y lo desconocido</text:h>
      <text:p text:style-name="P10"><text:span text:style-name="Strong_20_Emphasis">Frase</text:span>:“la prosaica historia que la muerte de George Birch me permite contar tiene, en sí misma, ciertos elementos que hacen que la más oscura de las comedias resulte luminosa.”</text:p>
      <text:p text:style-name="P10">Sugiere que lo que viene es <text:span text:style-name="Strong_20_Emphasis"><text:span text:style-name="T2">realmente espantoso</text:span></text:span>. Tan feo que, comparado con esta historia, las peores comedias de terror parecerían suaves e inocentes.</text:p>
      <text:p text:style-name="P11">Imagino algo asqueroso, cruel y perturbador. No solo un accidente tonto, sino algo que mezcla torpeza humana con algo mucho más siniestro y vengativo.</text:p>
      <text:p text:style-name="P11">Porque no te explica todavía qué pasó, pero te advierte que es peor de lo que puedas imaginar. Te genera esa inquietud de “no sé qué es, pero va a ser horrible”. Es como si te susurrara: “prepárate”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0:58:56.165258100</meta:creation-date>
    <dc:date>2026-06-15T13:13:54.049655100</dc:date>
    <meta:editing-duration>PT1H19M51S</meta:editing-duration>
    <meta:editing-cycles>1</meta:editing-cycles>
    <meta:document-statistic meta:table-count="0" meta:image-count="0" meta:object-count="0" meta:page-count="1" meta:paragraph-count="17" meta:word-count="378" meta:character-count="2182" meta:non-whitespace-character-count="1820"/>
    <meta:generator>LibreOffice/26.2.4.2$Windows_X86_64 LibreOffice_project/0229ac93fcf0d7cbc6376066c6f35021cef002dc</meta:generator>
  </office:meta>
</office:document-meta>
</file>